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30000009DFDE46549.png" manifest:media-type="image/png"/>
  <manifest:file-entry manifest:full-path="Pictures/100000010000010D0000010CD6D5E556.png" manifest:media-type="image/png"/>
  <manifest:file-entry manifest:full-path="Pictures/10000001000001CD000000C3FE67F1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2" style:family="paragraph" style:parent-style-name="Standard">
      <style:text-properties officeooo:rsid="000ca8b4" officeooo:paragraph-rsid="000ca8b4"/>
    </style:style>
    <style:style style:name="P3" style:family="paragraph" style:parent-style-name="Standard">
      <style:text-properties officeooo:rsid="000ac56d" officeooo:paragraph-rsid="000ac56d"/>
    </style:style>
    <style:style style:name="P4" style:family="paragraph" style:parent-style-name="Standard">
      <style:text-properties officeooo:rsid="000ca8b4" officeooo:paragraph-rsid="00255e7e"/>
    </style:style>
    <style:style style:name="P5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6" style:family="paragraph" style:parent-style-name="Standard">
      <style:text-properties fo:font-size="12pt" officeooo:rsid="000ac56d" officeooo:paragraph-rsid="000ac56d" style:font-size-asian="12pt" style:font-size-complex="12pt"/>
    </style:style>
    <style:style style:name="P7" style:family="paragraph" style:parent-style-name="Standard">
      <style:text-properties fo:font-size="12pt" fo:font-weight="bold" officeooo:rsid="002000ee" officeooo:paragraph-rsid="002000ee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normal" officeooo:rsid="002000ee" officeooo:paragraph-rsid="002000ee" style:font-name-asian="Noto Serif CJK SC" style:font-size-asian="12pt" style:font-weight-asian="normal" style:font-name-complex="Lohit Devanagari1" style:font-size-complex="12pt" style:font-weight-complex="normal"/>
    </style:style>
    <style:style style:name="P9" style:family="paragraph" style:parent-style-name="Standard">
      <style:text-properties fo:font-size="12pt" fo:font-weight="normal" officeooo:rsid="002000ee" officeooo:paragraph-rsid="002000ee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bold" officeooo:rsid="00207888" officeooo:paragraph-rsid="00207888" style:font-size-asian="12pt" style:font-weight-asian="bold" style:font-size-complex="12pt" style:font-weight-complex="bold"/>
    </style:style>
    <style:style style:name="P11" style:family="paragraph" style:parent-style-name="Standard">
      <style:text-properties fo:font-weight="normal" officeooo:rsid="0017a9f2" officeooo:paragraph-rsid="001657d8" style:font-weight-asian="normal" style:font-weight-complex="normal"/>
    </style:style>
    <style:style style:name="P12" style:family="paragraph" style:parent-style-name="Standard">
      <style:text-properties fo:font-weight="bold" officeooo:rsid="00207888" officeooo:paragraph-rsid="00207888" style:font-weight-asian="bold" style:font-weight-complex="bold"/>
    </style:style>
    <style:style style:name="P13" style:family="paragraph" style:parent-style-name="Standard">
      <style:text-properties fo:font-weight="bold" officeooo:rsid="0025a311" officeooo:paragraph-rsid="0025a311" style:font-weight-asian="bold" style:font-weight-complex="bold"/>
    </style:style>
    <style:style style:name="P14" style:family="paragraph" style:parent-style-name="Standard">
      <style:text-properties fo:font-weight="normal" officeooo:rsid="00207888" officeooo:paragraph-rsid="00207888" style:font-weight-asian="normal" style:font-weight-complex="normal"/>
    </style:style>
    <style:style style:name="P15" style:family="paragraph" style:parent-style-name="Standard">
      <style:text-properties fo:font-weight="bold" officeooo:rsid="00224017" officeooo:paragraph-rsid="00224017" style:font-weight-asian="bold" style:font-weight-complex="bold"/>
    </style:style>
    <style:style style:name="P16" style:family="paragraph" style:parent-style-name="Standard">
      <style:text-properties fo:font-weight="normal" officeooo:rsid="00224017" officeooo:paragraph-rsid="00224017" style:font-weight-asian="normal" style:font-weight-complex="normal"/>
    </style:style>
    <style:style style:name="P17" style:family="paragraph" style:parent-style-name="Standard">
      <style:text-properties fo:font-weight="normal" officeooo:paragraph-rsid="002373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657d8" style:font-weight-asian="bold" style:font-weight-complex="bold"/>
    </style:style>
    <style:style style:name="T4" style:family="text">
      <style:text-properties fo:font-weight="bold" officeooo:rsid="000ddd89" style:font-weight-asian="bold" style:font-weight-complex="bold"/>
    </style:style>
    <style:style style:name="T5" style:family="text">
      <style:text-properties fo:font-weight="bold" officeooo:rsid="002000ee" style:font-weight-asian="bold" style:font-weight-complex="bold"/>
    </style:style>
    <style:style style:name="T6" style:family="text">
      <style:text-properties fo:font-weight="bold" officeooo:rsid="0011fd2d" style:font-weight-asian="bold" style:font-weight-complex="bold"/>
    </style:style>
    <style:style style:name="T7" style:family="text">
      <style:text-properties fo:font-weight="bold" officeooo:rsid="0025fe01" style:font-weight-asian="bold" style:font-weight-complex="bold"/>
    </style:style>
    <style:style style:name="T8" style:family="text">
      <style:text-properties fo:font-weight="bold" officeooo:rsid="0014db4b" style:font-weight-asian="bold" style:font-weight-complex="bold"/>
    </style:style>
    <style:style style:name="T9" style:family="text">
      <style:text-properties fo:font-weight="bold" officeooo:rsid="001e2b6b" style:font-weight-asian="bold" style:font-weight-complex="bold"/>
    </style:style>
    <style:style style:name="T10" style:family="text">
      <style:text-properties fo:font-weight="bold" officeooo:rsid="0016bf11" style:font-weight-asian="bold" style:font-weight-complex="bold"/>
    </style:style>
    <style:style style:name="T11" style:family="text">
      <style:text-properties style:font-name="Liberation Serif" style:font-name-asian="Noto Serif CJK SC" style:font-name-complex="Lohit Devanagari1"/>
    </style:style>
    <style:style style:name="T12" style:family="text">
      <style:text-properties style:font-name="Liberation Serif" officeooo:rsid="0025a311" style:font-name-asian="Noto Serif CJK SC" style:font-name-complex="Lohit Devanagari1"/>
    </style:style>
    <style:style style:name="T13" style:family="text">
      <style:text-properties style:font-name="Liberation Serif" fo:font-weight="normal" officeooo:rsid="00207888" style:font-name-asian="Noto Serif CJK SC" style:font-weight-asian="normal" style:font-name-complex="Lohit Devanagari1" style:font-weight-complex="normal"/>
    </style:style>
    <style:style style:name="T14" style:family="text">
      <style:text-properties officeooo:rsid="0025a311"/>
    </style:style>
    <style:style style:name="T15" style:family="text">
      <style:text-properties officeooo:rsid="0025fe01"/>
    </style:style>
    <style:style style:name="T16" style:family="text">
      <style:text-properties fo:font-style="italic" officeooo:rsid="0025fe01" style:font-style-asian="italic" style:font-style-complex="italic"/>
    </style:style>
    <style:style style:name="T17" style:family="text">
      <style:text-properties style:font-name="Liberation Serif" officeooo:rsid="00207888" style:font-name-asian="Noto Serif CJK SC" style:font-name-complex="Lohit Devanagari1"/>
    </style:style>
    <style:style style:name="T18" style:family="text">
      <style:text-properties style:font-name="Liberation Serif" fo:font-weight="normal" style:font-name-asian="Noto Serif CJK SC" style:font-weight-asian="normal" style:font-name-complex="Lohit Devanagari1" style:font-weight-complex="normal"/>
    </style:style>
    <style:style style:name="T19" style:family="text">
      <style:text-properties officeooo:rsid="00207888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224017"/>
    </style:style>
    <style:style style:name="T22" style:family="text">
      <style:text-properties style:text-position="sub 58%"/>
    </style:style>
    <style:style style:name="T23" style:family="text">
      <style:text-properties style:text-position="0% 100%"/>
    </style:style>
    <style:style style:name="T24" style:family="text">
      <style:text-properties officeooo:rsid="00237373"/>
    </style:style>
    <style:style style:name="T25" style:family="text">
      <style:text-properties officeooo:rsid="00237373" style:font-weight-asian="normal" style:font-weight-complex="normal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style:font-weight-asian="normal" style:font-weight-complex="normal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officeooo:rsid="00237373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 ________________________</text:p>
      <text:p text:style-name="P2"><text:span text:style-name="T1"><text:tab/><text:tab/><text:tab/><text:tab/><text:tab/></text:span><text:span text:style-name="T2">PHY20</text:span><text:span text:style-name="T3">4</text:span><text:span text:style-name="T2">8C, </text:span><text:span text:style-name="T4">Homework</text:span><text:span text:style-name="T1"> </text:span><text:span text:style-name="T5">5</text:span></text:p>
      <text:p text:style-name="P3"><text:span text:style-name="T1"/></text:p>
      <text:p text:style-name="P4"><text:span text:style-name="T6">A- <text:s/></text:span><text:span text:style-name="T7">Upload </text:span><text:span text:style-name="T8">a</text:span><text:span text:style-name="T9"> </text:span><text:span text:style-name="T8">handwritten version </text:span><text:span text:style-name="T10">of the solutions</text:span><text:span text:style-name="T8"> (clearly readable)</text:span><text:span text:style-name="T9"> </text:span><text:span text:style-name="T7">via Canvas</text:span><text:span text:style-name="T4">.</text:span></text:p>
      <text:p text:style-name="P5">---------------------------------------------------------------------------------------------------------------------------</text:p>
      <text:p text:style-name="P6"><text:span text:style-name="T1"/></text:p>
      <text:p text:style-name="P7"><text:span text:style-name="T11">Problem </text:span><text:span text:style-name="T12">1</text:span><text:span text:style-name="T11"> </text:span><text:span text:style-name="T13">(Wolfson and Passachoff)</text:span></text:p>
      <text:p text:style-name="P7"><text:span text:style-name="T11"/></text:p>
      <text:p text:style-name="P8">You are to build the oscillation transfer device shown in Fig. <text:span text:style-name="T14">1</text:span>. It consists of two spring–block systems hanging from a flexible rod. When the spring of system 1 is stretched and then released, the resulting <text:span text:style-name="T14">simple harmonic motion</text:span> of system 1 at frequency f<text:span text:style-name="T14">_</text:span>1 oscillates the rod. <text:span text:style-name="T14">The rod has mass M=</text:span><text:span text:style-name="T15">4</text:span><text:span text:style-name="T14">00g, length L=0.25m, </text:span><text:span text:style-name="T15">and</text:span><text:span text:style-name="T14"> </text:span><text:span text:style-name="T15">it can itself be modeled as a spring of k = 1600 N/m</text:span><text:span text:style-name="T14">.</text:span> The rod then exerts a driving force on system 2, at the frequency f<text:span text:style-name="T14">_2, which </text:span><text:span text:style-name="T15">is the frequency at which </text:span><text:span text:style-name="T14">the rod responds to the forcing</text:span>. You can choose from four springs with spring constants k of 1500, 1400, 1200 N/m <text:span text:style-name="T15">and 400 N/m</text:span>, and four blocks with masses m of 800, 500, 400, and 200 kg. <text:span text:style-name="T14">D</text:span>etermine which spring should go with which block in each of the two systems to maximize the amplitude of oscillations in system 2. <text:span text:style-name="T15">(Hint: consider that to maximize an amplitude, you want oscillators to be in </text:span><text:span text:style-name="T16">resonance</text:span><text:span text:style-name="T15">)</text:span></text:p>
      <text:p text:style-name="P9"><text:span text:style-name="T11"/></text:p>
      <text:p text:style-name="P9"><text:span text:style-name="T11"><text:tab/></text:span><draw:frame draw:style-name="fr1" draw:name="Image1" text:anchor-type="char" svg:width="4.802in" svg:height="2.0311in" draw:z-index="2"><draw:image xlink:href="Pictures/10000001000001CD000000C3FE67F1F6.png" xlink:type="simple" xlink:show="embed" xlink:actuate="onLoad" draw:mime-type="image/png"/></draw:frame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><text:tab/><text:tab/><text:tab/><text:tab/><text:tab/><text:tab/></text:span><text:span text:style-name="T17">Figure 1</text:span></text:p>
      <text:p text:style-name="P10"><text:span text:style-name="T11">Problem </text:span><text:span text:style-name="T12">2 </text:span><text:span text:style-name="T11">(</text:span><text:span text:style-name="T18">Wolfson and Passachoff)</text:span></text:p>
      <text:p text:style-name="P11"/>
      <text:p text:style-name="P11">It’s not possible to breathe through a snorkel from a depth greater than a meter or so. Why not?</text:p>
      <text:p text:style-name="P11"><draw:frame draw:style-name="fr1" draw:name="Image2" text:anchor-type="char" svg:width="3.698in" svg:height="1.6354in" draw:z-index="0"><draw:image xlink:href="Pictures/10000001000001630000009DFDE46549.png" xlink:type="simple" xlink:show="embed" xlink:actuate="onLoad" draw:mime-type="image/png"/></draw:frame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tab/><text:tab/><text:tab/><text:tab/><text:span text:style-name="T19">Figure 2</text:span></text:p>
      <text:p text:style-name="P12"/>
      <text:p text:style-name="P12"/>
      <text:p text:style-name="P12"/>
      <text:p text:style-name="P12"/>
      <text:p text:style-name="P13"/>
      <text:p text:style-name="P13"><text:soft-page-break/></text:p>
      <text:p text:style-name="P13">Problem 3</text:p>
      <text:p text:style-name="P14">Three children, each of <text:span text:style-name="T14">mass=40 Kg</text:span>, make a log raft by lashing together logs of diameter 0.30 m and length 1.80 m. How many logs will be needed to keep them afloat in fresh water? <text:span text:style-name="T14">(</text:span><text:span text:style-name="T15">Hint: f</text:span><text:span text:style-name="T14">or this, you need to estimate/Google the density of </text:span><text:span text:style-name="T15">a</text:span><text:span text:style-name="T14"> log).</text:span>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>Problem <text:span text:style-name="T15">4</text:span></text:p>
      <text:p text:style-name="P12"/>
      <text:p text:style-name="P14"><text:span text:style-name="T20">Canal effect.</text:span> Figure 3 shows an anchored barge that extends across a canal by distance d = 30 m and into the water by distance b = 1<text:span text:style-name="T21">0</text:span> m. The <text:span text:style-name="T21">Panama C</text:span>anal <text:span text:style-name="T21">(at the Culebra Cut)</text:span> has a <text:span text:style-name="T21">minimum </text:span>width D = <text:span text:style-name="T21">1</text:span>5<text:span text:style-name="T21">2</text:span> m, a water depth <text:span text:style-name="T21">o</text:span>f H = 1<text:span text:style-name="T21">3</text:span> m. <text:span text:style-name="T21">Assume an</text:span> uniform water-flow speed of v<text:span text:style-name="T22">i</text:span><text:span text:style-name="T23"> = 1.5 m/s. Assume that the flow around the barge is uniform. As the water passes the </text:span>bow, the water level undergoes a dramatic dip known as the <text:span text:style-name="T20">canal effect.</text:span> If the dip has depth h = 0.80 m, what is the water speed alongside the boat through the vertical cross-sections at (a) point a and (b) point b? The erosion due to the speed increase is a common concern to hydraulic engineers.</text:p>
      <text:p text:style-name="P14"><draw:frame draw:style-name="fr1" draw:name="Image3" text:anchor-type="char" svg:width="2.802in" svg:height="2.7917in" draw:z-index="1"><draw:image xlink:href="Pictures/100000010000010D0000010CD6D5E556.png" xlink:type="simple" xlink:show="embed" xlink:actuate="onLoad" draw:mime-type="image/png"/></draw:frame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<text:tab/><text:tab/><text:tab/><text:tab/> <text:s text:c="6"/>Figure 3</text:p>
      <text:p text:style-name="P14"/>
      <text:p text:style-name="P15">Problem <text:span text:style-name="T15">5</text:span></text:p>
      <text:p text:style-name="P15"/>
      <text:p text:style-name="P16"><text:span text:style-name="T24">B</text:span>lood is flowing through an artery partially clogged by cholesterol <text:span text:style-name="T24">(assume no viscosity for the blood)</text:span>. A surgeon wants to remove enough of the cholesterol to double the flow rate of blood through this artery. If the original diameter of the artery is D, <text:span text:style-name="T24">(a) </text:span>what should be the new diameter (in terms of D) to accomplish this for the same pressure gradient?</text:p>
      <text:p text:style-name="P16"/>
      <text:p text:style-name="P17"><text:span text:style-name="T25">(b) Now allow for viscosity, and use </text:span><text:span text:style-name="T26">Poiseuille’s </text:span><text:span text:style-name="T27">equation for the flow rate. (Notice how sensible is blood pressure to the artery diameter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1T11:21:46.087040663</meta:creation-date>
    <dc:date>2026-03-24T17:26:31.782782731</dc:date>
    <meta:editing-duration>PT1H23M49S</meta:editing-duration>
    <meta:editing-cycles>13</meta:editing-cycles>
    <meta:generator>LibreOffice/25.8.5.2$Linux_X86_64 LibreOffice_project/580$Build-2</meta:generator>
    <meta:print-date>2024-12-18T12:45:32.072286515</meta:print-date>
    <meta:printed-by>PDF files</meta:printed-by>
    <meta:document-statistic meta:table-count="0" meta:image-count="3" meta:object-count="0" meta:page-count="2" meta:paragraph-count="21" meta:word-count="488" meta:character-count="2789" meta:non-whitespace-character-count="2288"/>
  </office:meta>
</office:document-meta>
</file>