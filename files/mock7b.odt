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741FE6D487.png" manifest:media-type="image/png"/>
  <manifest:file-entry manifest:full-path="Pictures/10000001000000BC000000C35B8C80F3.png" manifest:media-type="image/png"/>
  <manifest:file-entry manifest:full-path="Pictures/100000010000014D000000D871BFABFA.png" manifest:media-type="image/png"/>
  <manifest:file-entry manifest:full-path="Pictures/1000000100000179000000D89DC86D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ca8b4" officeooo:paragraph-rsid="000bb6a4" style:font-weight-asian="bold" style:font-weight-complex="bold"/>
    </style:style>
    <style:style style:name="P2" style:family="paragraph" style:parent-style-name="Standard">
      <style:text-properties officeooo:rsid="000ca8b4" officeooo:paragraph-rsid="000bb6a4"/>
    </style:style>
    <style:style style:name="P3" style:family="paragraph" style:parent-style-name="Standard">
      <style:text-properties officeooo:rsid="000ac56d" officeooo:paragraph-rsid="000bb6a4"/>
    </style:style>
    <style:style style:name="P4" style:family="paragraph" style:parent-style-name="Standard">
      <style:text-properties fo:font-weight="bold" officeooo:rsid="000ca8b4" officeooo:paragraph-rsid="000bb6a4" style:font-weight-asian="bold" style:font-weight-complex="bold"/>
    </style:style>
    <style:style style:name="P5" style:family="paragraph" style:parent-style-name="Standard">
      <style:text-properties fo:font-weight="bold" officeooo:rsid="000ac56d" officeooo:paragraph-rsid="000bb6a4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0c2132" officeooo:paragraph-rsid="000c213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c2132" officeooo:paragraph-rsid="000c21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f70ec" style:font-weight-asian="bold" style:font-weight-complex="bold"/>
    </style:style>
    <style:style style:name="T5" style:family="text">
      <style:text-properties fo:font-weight="bold" officeooo:rsid="000bb6a4" style:font-weight-asian="bold" style:font-weight-complex="bold"/>
    </style:style>
    <style:style style:name="T6" style:family="text">
      <style:text-properties fo:font-weight="bold" officeooo:rsid="000d419b" style:font-weight-asian="bold" style:font-weight-complex="bold"/>
    </style:style>
    <style:style style:name="T7" style:family="text">
      <style:text-properties officeooo:rsid="001527a6"/>
    </style:style>
    <style:style style:name="T8" style:family="text">
      <style:text-properties officeooo:rsid="000bb6a4"/>
    </style:style>
    <style:style style:name="T9" style:family="text">
      <style:text-properties fo:font-family="'Liberation Serif'" style:font-family-generic="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2"/></text:span><text:span text:style-name="T2">PHY20</text:span><text:span text:style-name="T3">4</text:span><text:span text:style-name="T4">9</text:span><text:span text:style-name="T2">C, </text:span><text:span text:style-name="T5">Practice </text:span><text:span text:style-name="T1">Quiz </text:span><text:span text:style-name="T6">7</text:span></text:p>
      <text:p text:style-name="P3"><text:span text:style-name="T1"/></text:p>
      <text:p text:style-name="P4">A- Read all the quiz once, or twice, before beginning to write. Make sure to comprehend all questions and start with those you fe<text:span text:style-name="T7">el</text:span> most confident <text:span text:style-name="T7">in</text:span>.</text:p>
      <text:p text:style-name="P4">B – Be clear and concise. There are no extra points for being verbose or writing extra.</text:p>
      <text:p text:style-name="P4">C –Only use the white pages that I will provide. You have <text:span text:style-name="T8">6</text:span>0 minutes to answer the quiz.</text:p>
      <text:p text:style-name="P5">---------------------------------------------------------------------------------------------------------------------------</text:p>
      <text:p text:style-name="P6">Problem 1</text:p>
      <text:p text:style-name="P7">The square loop shown in the Figure on the left moves into a 0.80 T magnetic field at a constant speed of 10 m/s. The loop has a resistance of 0.10 <text:span text:style-name="T9">Ω</text:span>, and it enters the field at t = 0 s. Find the induced emf as a function of time</text:p>
      <text:p text:style-name="P7"><draw:frame draw:style-name="fr1" draw:name="Image1" text:anchor-type="char" svg:x="0.2209in" svg:y="0.0618in" svg:width="3.0409in" svg:height="1.7425in" draw:z-index="0"><draw:image xlink:href="Pictures/1000000100000179000000D89DC86DCE.png" xlink:type="simple" xlink:show="embed" xlink:actuate="onLoad" draw:mime-type="image/png"/></draw:frame><draw:frame draw:style-name="fr1" draw:name="Image4" text:anchor-type="char" svg:x="4.4535in" svg:y="0in" svg:width="1.9583in" svg:height="2.0311in" draw:z-index="3"><draw:image xlink:href="Pictures/10000001000000BC000000C35B8C80F3.png" xlink:type="simple" xlink:show="embed" xlink:actuate="onLoad" draw:mime-type="image/png"/></draw:frame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blem 2</text:p>
      <text:p text:style-name="P7">The L-shaped conductor in the figure on the top and right moves at 10 m/s across a stationary L-shaped conductor in a 0.10 T magnetic field. The two vertices overlap, so that the enclosed area is zero, at t = 0 s. What is the induced emf?</text:p>
      <text:p text:style-name="P7"/>
      <text:p text:style-name="P6">Problem 3</text:p>
      <text:p text:style-name="P7"/>
      <text:p text:style-name="P7">What is the magnetic flux through the loop shown in the figure?</text:p>
      <text:p text:style-name="P7"><draw:frame draw:style-name="fr1" draw:name="Image3" text:anchor-type="char" svg:x="0.0543in" svg:y="0.0409in" svg:width="2.1252in" svg:height="1.2083in" draw:z-index="2"><draw:image xlink:href="Pictures/10000001000000CC000000741FE6D487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>Problem 4</text:p>
      <text:p text:style-name="P7">The Figure shows a 10 cm square bent at a 90° angle. A uniform 0.050 T magnetic field points downward at a 45° angle. What is the magnetic flux through the loop?</text:p>
      <text:p text:style-name="P7"/>
      <text:p text:style-name="P7"><draw:frame draw:style-name="fr2" draw:name="Image2" text:anchor-type="char" svg:width="2.2228in" svg:height="1.4417in" draw:z-index="1"><draw:image xlink:href="Pictures/100000010000014D000000D871BFABFA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7:28:02.210601071</meta:creation-date>
    <dc:date>2026-03-30T17:52:51.154533929</dc:date>
    <meta:editing-duration>PT1M24S</meta:editing-duration>
    <meta:editing-cycles>1</meta:editing-cycles>
    <meta:generator>LibreOffice/25.8.5.2$Linux_X86_64 LibreOffice_project/580$Build-2</meta:generator>
    <meta:document-statistic meta:table-count="0" meta:image-count="4" meta:object-count="0" meta:page-count="1" meta:paragraph-count="14" meta:word-count="218" meta:character-count="1237" meta:non-whitespace-character-count="1024"/>
  </office:meta>
</office:document-meta>
</file>