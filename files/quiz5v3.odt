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-asian="Liberation Serif" style:font-name-complex="Liberation Serif"/>
    </style:style>
    <style:style style:name="T13" style:parent-style-name="DefaultParagraphFont" style:family="text">
      <style:text-properties style:font-name-asian="Liberation Serif" style:font-name-complex="Liberation Serif"/>
    </style:style>
    <style:style style:name="T14" style:parent-style-name="DefaultParagraphFont" style:family="text">
      <style:text-properties style:text-position="sub 66.6%"/>
    </style:style>
    <style:style style:name="T15" style:parent-style-name="DefaultParagraphFont" style:family="text">
      <style:text-properties style:font-name-asian="Liberation Serif" style:font-name-complex="Liberation Serif"/>
    </style:style>
    <style:style style:name="T16" style:parent-style-name="DefaultParagraphFont" style:family="text">
      <style:text-properties style:font-name-asian="Liberation Serif" style:font-name-complex="Liberation Serif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me ________________________</text:p>
      <text:p text:style-name="Standard"><text:span text:style-name="T2"><text:tab/></text:span><text:span text:style-name="T3"><text:tab/></text:span><text:span text:style-name="T4"><text:tab/></text:span><text:span text:style-name="T5"><text:tab/></text:span><text:span text:style-name="T6"><text:tab/><text:s text:c="6"/>PHY2048C, Quiz 5</text:span></text:p>
      <text:p text:style-name="Standard"/>
      <text:p text:style-name="P7">A- Read all the quiz once, or twice, before beginning to write. Make sure to comprehend all questions and start with those you feel most confident in.</text:p>
      <text:p text:style-name="P8">B – Be clear and concise. There are no extra points for being verbose or writing extra.</text:p>
      <text:p text:style-name="P9">C –Only use the white pages that I will provide. You have 50 minutes to answer the quiz.</text:p>
      <text:p text:style-name="P10">---------------------------------------------------------------------------------------------------------------------------</text:p>
      <text:p text:style-name="P11">Problem 1</text:p>
      <text:p text:style-name="Standard">A uniform beam of length L and mass m shown in the figure is inclined at an angle<text:s/><text:span text:style-name="T12">θ</text:span><text:s/>to the horizontal. Its upper end is connected to a wall by a rope, and its lower end rests on a rough, horizontal surface. The coefficient of static friction between the beam and surface is<text:s/><text:span text:style-name="T13">μ</text:span><text:span text:style-name="T14">S<text:s/></text:span>Assume the angle<text:s/><text:span text:style-name="T15">θ<text:s/></text:span>is such that the static friction force is at its maximum value. (a) Draw a force diagram for the beam. (b) Using the condition of rotational equilibrium, find an expression for the tension T in the rope in terms of m, g, and<text:s/><text:span text:style-name="T16">θ</text:span>.</text:p>
      <text:p text:style-name="Standard"><draw:frame draw:z-index="251658240" draw:style-name="a0" draw:name="Image1" text:anchor-type="paragraph" svg:x="0in" svg:y="0in" svg:width="2.5244in" svg:height="2.1035in" style:rel-width="scale" style:rel-height="scale"><draw:image xlink:href="media/image1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Problem 2</text:p>
      <text:p text:style-name="Standard">A 60-kg uniform board 2.4 m long is supported by a pivot 80 cm from the left end and by a scale at the right end (Fig. 12.14). How far from the left end should a 40-kg child sit for the scale to read zero?</text:p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1.7807in" svg:y="0in" svg:width="3.3646in" svg:height="1.3646in" style:rel-width="scale" style:rel-height="scale"><draw:image xlink:href="media/image2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Problem<text:s/>3</text:p>
      <text:p text:style-name="Standard">Ahmad, Sebas and Barbara were given some money each. After Ahmad spends B/.50 each day and Sebas spends B/. 25 each day, and Barbara spends B/. 10 each day during a fixed number of days, Ahmad still has B/.600 remaining while Sebas spent all his money and Barabara has the same amount that Sebas had at the beginning. If instead Ahmad spends B/. 25 and Sebas<text:s/>and Barbara<text:s/>B/. 75<text:s/>each,<text:s/>each day during the same period, Ahmad will still have B/. 2100 while Sebas and Barbara owe money. How much money do Sebas and Barbara owe together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Sega Neuman</meta:initial-creator>
    <dc:creator>Daniel Sega Neuman</dc:creator>
    <meta:creation-date>2025-10-16T16:02:00Z</meta:creation-date>
    <dc:date>2026-03-17T17:16:00Z</dc:date>
    <meta:template xlink:href="Normal" xlink:type="simple"/>
    <meta:editing-cycles>1</meta:editing-cycles>
    <meta:editing-duration>PT7920S</meta:editing-duration>
    <meta:document-statistic meta:page-count="1" meta:paragraph-count="3" meta:word-count="273" meta:character-count="1829" meta:row-count="12" meta:non-whitespace-character-count="1559"/>
  </office:meta>
</office:document-meta>
</file>