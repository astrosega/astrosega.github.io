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40000015002282447.png" manifest:media-type="image/png"/>
  <manifest:file-entry manifest:full-path="Pictures/10000000000002E0000002E0FB9429D8.png" manifest:media-type="image/png"/>
  <manifest:file-entry manifest:full-path="Pictures/1000000100000120000001240D895F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weight="bold" officeooo:rsid="000ca8b4" officeooo:paragraph-rsid="00152dfd" style:font-weight-asian="bold" style:font-weight-complex="bold"/>
    </style:style>
    <style:style style:name="P2" style:family="paragraph" style:parent-style-name="Standard">
      <style:text-properties officeooo:rsid="000ca8b4" officeooo:paragraph-rsid="00152dfd"/>
    </style:style>
    <style:style style:name="P3" style:family="paragraph" style:parent-style-name="Standard">
      <style:text-properties officeooo:rsid="000ac56d" officeooo:paragraph-rsid="00152dfd"/>
    </style:style>
    <style:style style:name="P4" style:family="paragraph" style:parent-style-name="Standard">
      <style:text-properties fo:font-weight="bold" officeooo:rsid="000ca8b4" officeooo:paragraph-rsid="00152dfd" style:font-weight-asian="bold" style:font-weight-complex="bold"/>
    </style:style>
    <style:style style:name="P5" style:family="paragraph" style:parent-style-name="Standard">
      <style:text-properties fo:font-weight="bold" officeooo:rsid="000ac56d" officeooo:paragraph-rsid="00152dfd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font-name="Liberation Serif1" fo:font-size="12pt" fo:letter-spacing="normal" fo:font-style="normal" fo:font-weight="bold" officeooo:rsid="0014759a" officeooo:paragraph-rsid="0013f4b2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font-name="Liberation Serif1" fo:font-size="12pt" fo:letter-spacing="normal" fo:font-style="normal" fo:font-weight="normal" officeooo:rsid="0014759a" officeooo:paragraph-rsid="0013f4b2" style:font-weight-asian="normal" style:font-weight-complex="normal"/>
    </style:style>
    <style:style style:name="P8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font-name="Liberation Serif1" fo:font-size="12pt" fo:letter-spacing="normal" fo:font-style="normal" fo:font-weight="bold" officeooo:rsid="0013f4b2" officeooo:paragraph-rsid="0013f4b2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font-name="Liberation Serif1" fo:font-size="12pt" fo:letter-spacing="normal" fo:font-style="normal" fo:font-weight="normal" officeooo:rsid="0013f4b2" officeooo:paragraph-rsid="0013f4b2" style:font-weight-asian="normal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font-name="Liberation Serif" fo:font-size="12pt" fo:letter-spacing="normal" fo:font-style="normal" fo:font-weight="normal" officeooo:rsid="00152dfd" officeooo:paragraph-rsid="0013f4b2" style:font-weight-asian="normal" style:font-weight-complex="normal"/>
    </style:style>
    <style:style style:name="P13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font-name="Liberation Serif1" fo:font-size="12pt" fo:letter-spacing="normal" fo:font-style="normal" fo:font-weight="bold" officeooo:rsid="0014759a" officeooo:paragraph-rsid="00152dfd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font-name="Liberation Serif1" fo:font-size="12pt" fo:letter-spacing="normal" fo:font-style="normal" fo:font-weight="normal" officeooo:rsid="00152dfd" officeooo:paragraph-rsid="00152dfd" style:font-weight-asian="normal" style:font-weight-complex="normal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2329e" style:font-weight-asian="bold" style:font-weight-complex="bold"/>
    </style:style>
    <style:style style:name="T4" style:family="text">
      <style:text-properties fo:font-weight="bold" officeooo:rsid="0012eefd" style:font-weight-asian="bold" style:font-weight-complex="bold"/>
    </style:style>
    <style:style style:name="T5" style:family="text">
      <style:text-properties fo:font-weight="bold" officeooo:rsid="000d419b" style:font-weight-asian="bold" style:font-weight-complex="bold"/>
    </style:style>
    <style:style style:name="T6" style:family="text">
      <style:text-properties officeooo:rsid="001527a6"/>
    </style:style>
    <style:style style:name="T7" style:family="text">
      <style:text-properties officeooo:rsid="0013f4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52dfd"/>
    </style:style>
    <style:style style:name="T10" style:family="text">
      <style:text-properties officeooo:rsid="00152d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8055in, 0in, -0.0008in, 3.6398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98in" draw:marker-start-width="0.228in" draw:marker-end-width="0.228in" draw:textarea-horizontal-align="center" draw:textarea-vertical-align="middle" fo:padding-top="0.0291in" fo:padding-bottom="0.0291in" fo:padding-left="0.0291in" fo:padding-right="0.02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2.6575in" fo:min-width="1.378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000000" draw:textarea-horizontal-align="justify" draw:textarea-vertical-align="middle" draw:auto-grow-height="false" fo:min-height="0.0709in" fo:min-width="0.0709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fill="none" draw:fill-color="#ffffff" fo:min-height="0.693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________________________</text:p>
      <text:p text:style-name="P2"><text:span text:style-name="T1"><text:tab/><text:tab/><text:tab/><text:tab/><text:tab/> <text:s text:c="3"/></text:span><text:span text:style-name="T2">PHY20</text:span><text:span text:style-name="T3">4</text:span><text:span text:style-name="T4">8</text:span><text:span text:style-name="T2">C, </text:span><text:span text:style-name="T1">Quiz </text:span><text:span text:style-name="T5">7</text:span></text:p>
      <text:p text:style-name="P3"><text:span text:style-name="T1"/></text:p>
      <text:p text:style-name="P4">A- Read all the quiz once, or twice, before beginning to write. Make sure to comprehend all questions and start with those you fe<text:span text:style-name="T6">el</text:span> most confident <text:span text:style-name="T6">in</text:span>.</text:p>
      <text:p text:style-name="P4">B – Be clear and concise. There are no extra points for being verbose or writing extra.</text:p>
      <text:p text:style-name="P4">C –Only use the white pages that I will provide. You have 50 minutes to answer the quiz.</text:p>
      <text:p text:style-name="P5">---------------------------------------------------------------------------------------------------------------------------</text:p>
      <text:p text:style-name="P6">Problem <text:span text:style-name="T7">1</text:span></text:p>
      <text:p text:style-name="P7"/>
      <text:p text:style-name="P7">At the beach you see the crests of the waves are 3m apart and 8 of them pass you in 12s. What is the wave velocity?</text:p>
      <text:p text:style-name="P7"/>
      <text:p text:style-name="P7"/>
      <text:p text:style-name="P8">Problem 2</text:p>
      <text:p text:style-name="P9"><draw:path text:anchor-type="paragraph" draw:z-index="1" draw:name="Bézier curve 1" draw:style-name="gr1" draw:text-style-name="P10" svg:width="0.3488in" svg:height="0.1429in" draw:transform="rotate (-0.321664181142555) translate (1.24372912860855in 1.47919150078001in)" svg:viewBox="0 0 887 364" svg:d="M0 351c281 35 613 10 820-217l67-134"><text:p/></draw:path><draw:path text:anchor-type="paragraph" draw:z-index="2" draw:name="Bézier curve 2" draw:style-name="gr2" draw:text-style-name="P10" svg:width="0.2661in" svg:height="0.2209in" draw:transform="rotate (-2.9229028983149) translate (1.52345136259074in 1.97356587814746in)" svg:viewBox="0 0 677 562" svg:d="M344 465c385 262 459-465 104-465-609-1 274 887-368 433l-80 118"><text:p/></draw:path><draw:custom-shape text:anchor-type="paragraph" draw:z-index="4" draw:name="Shape 1" draw:style-name="gr3" draw:text-style-name="P11" svg:width="1.3787in" svg:height="2.6579in" svg:x="2.4602in" svg:y="0.5807in"><text:p/><draw:enhanced-geometry svg:viewBox="0 0 21600 21600" draw:type="rectangle" draw:enhanced-path="M 0 0 L 21600 0 21600 21600 0 21600 0 0 Z N"/></draw:custom-shape><draw:frame draw:style-name="fr1" draw:name="Image3" text:anchor-type="char" svg:x="0.2953in" svg:y="0.8756in" svg:width="2.1665in" svg:height="2.1972in" draw:z-index="0"><draw:image xlink:href="Pictures/1000000100000120000001240D895F28.png" xlink:type="simple" xlink:show="embed" xlink:actuate="onLoad" draw:mime-type="image/png"/></draw:frame>A wind of 25 mi per hour blows over the house in the figure. The window is closed and the air inside the house is stagnant. The angle of the roof <text:span text:style-name="T8">σ =150°. The house is a 30 m by 30 m square. You can ignore the length of the eaves.</text:span><draw:frame draw:style-name="fr2" draw:name="Image2" text:anchor-type="char" svg:x="2.8598in" svg:y="1.4665in" svg:width="3.6374in" svg:height="2.2752in" draw:z-index="3"><draw:image xlink:href="Pictures/10000000000002E0000002E0FB9429D8.png" xlink:type="simple" xlink:show="embed" xlink:actuate="onLoad" draw:mime-type="image/png"/></draw:frame><text:span text:style-name="T8"> </text:span><text:span text:style-name="T9">Compute the net force on the roof due to the pressure difference. Ignore the effects of the gravitational force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Problem <text:span text:style-name="T10">3</text:span></text:p>
      <text:p text:style-name="P14">Rank the pressures at <draw:frame draw:style-name="fr1" draw:name="Image4" text:anchor-type="char" svg:x="3.428in" svg:y="0.0945in" svg:width="3.1681in" svg:height="2.5346in" draw:z-index="5"><draw:image xlink:href="Pictures/10000001000001A40000015002282447.png" xlink:type="simple" xlink:show="embed" xlink:actuate="onLoad" draw:mime-type="image/png"/></draw:frame>points a to d from largest to smallest.</text:p>
      <text:p text:style-name="P14"><draw:custom-shape text:anchor-type="paragraph" draw:z-index="7" draw:name="Shape 4" draw:style-name="gr4" draw:text-style-name="P15" svg:width="0.0988in" svg:height="0.0988in" svg:x="6.2016in" svg:y="0.2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Text Frame 2" draw:style-name="gr5" draw:text-style-name="P16" svg:width="0.6941in" svg:height="0.6941in" svg:x="6.1965in" svg:y="0.0016in"><draw:text-box><text:p><text:span text:style-name="T1">D</text:span></text:p></draw:text-box></draw:frame></text:p>
      <text:p text:style-name="P12"/>
      <text:p text:style-name="P12"/>
      <text:p text:style-name="P12"><draw:frame text:anchor-type="paragraph" draw:z-index="8" draw:name="Text Frame 1" draw:style-name="gr5" draw:text-style-name="P16" svg:width="0.6941in" svg:height="0.6941in" svg:x="6.2016in" svg:y="0.1201in"><draw:text-box><text:p><text:span text:style-name="T1">C</text:span></text:p></draw:text-box></draw:frame></text:p>
      <text:p text:style-name="P12"><draw:custom-shape text:anchor-type="paragraph" draw:z-index="6" draw:name="Shape 2" draw:style-name="gr4" draw:text-style-name="P15" svg:width="0.0988in" svg:height="0.0988in" svg:x="6.2016in" svg:y="0.2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0T19:01:34.794498738</meta:creation-date>
    <meta:editing-duration>PT1M54S</meta:editing-duration>
    <meta:editing-cycles>2</meta:editing-cycles>
    <meta:generator>LibreOffice/26.2.2.2$Linux_X86_64 LibreOffice_project/620$Build-2</meta:generator>
    <dc:date>2026-03-30T19:13:30.303917081</dc:date>
    <meta:document-statistic meta:table-count="0" meta:image-count="3" meta:object-count="0" meta:page-count="1" meta:paragraph-count="12" meta:word-count="181" meta:character-count="1048" meta:non-whitespace-character-count="869"/>
  </office:meta>
</office:document-meta>
</file>