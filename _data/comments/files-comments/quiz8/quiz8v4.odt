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B000000FA216878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officeooo:paragraph-rsid="000ea436"/>
    </style:style>
    <style:style style:name="P2" style:family="paragraph" style:parent-style-name="Standard">
      <style:text-properties officeooo:paragraph-rsid="000ea436"/>
    </style:style>
    <style:style style:name="P3" style:family="paragraph" style:parent-style-name="Standard">
      <style:text-properties fo:font-weight="bold" officeooo:paragraph-rsid="000ea436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1.1862in"/>
        </style:tab-stops>
      </style:paragraph-properties>
      <style:text-properties fo:font-variant="normal" fo:text-transform="none" fo:color="#000000" loext:opacity="100%" style:font-name="Liberation Serif" fo:font-size="12pt" fo:letter-spacing="normal" fo:font-style="normal" fo:font-weight="bold" officeooo:rsid="0014759a" officeooo:paragraph-rsid="000ea436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1.1862in"/>
        </style:tab-stops>
      </style:paragraph-properties>
      <style:text-properties fo:font-variant="normal" fo:text-transform="none" fo:color="#000000" loext:opacity="100%" style:font-name="Liberation Serif" fo:font-size="12pt" fo:letter-spacing="normal" fo:font-style="normal" fo:font-weight="normal" officeooo:rsid="0014759a" officeooo:paragraph-rsid="000ea436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1.1862in"/>
        </style:tab-stops>
      </style:paragraph-properties>
      <style:text-properties fo:font-variant="normal" fo:text-transform="none" fo:color="#000000" loext:opacity="100%" style:font-name="Liberation Serif" fo:font-size="12pt" fo:letter-spacing="normal" fo:font-style="normal" fo:font-weight="bold" officeooo:rsid="0013f4b2" officeooo:paragraph-rsid="000ea436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1.1862in"/>
        </style:tab-stops>
      </style:paragraph-properties>
      <style:text-properties fo:font-variant="normal" fo:text-transform="none" fo:color="#000000" loext:opacity="100%" style:font-name="Liberation Serif" fo:font-size="12pt" fo:letter-spacing="normal" fo:font-style="normal" fo:font-weight="normal" officeooo:rsid="0013f4b2" officeooo:paragraph-rsid="000ea43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a436" style:font-weight-asian="bold" style:font-weight-complex="bold"/>
    </style:style>
    <style:style style:name="T3" style:family="text">
      <style:text-properties officeooo:rsid="0013f4b2"/>
    </style:style>
    <style:style style:name="T4" style:family="text">
      <style:text-properties officeooo:rsid="000ea43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________________________ </text:span><text:span text:style-name="Default_20_Paragraph_20_Font"><text:span text:style-name="T1"><text:s/>PHY204</text:span></text:span><text:span text:style-name="Default_20_Paragraph_20_Font"><text:span text:style-name="T2">8</text:span></text:span><text:span text:style-name="Default_20_Paragraph_20_Font"><text:span text:style-name="T1">C, Quiz 8</text:span></text:span></text:p>
      <text:p text:style-name="P2"/>
      <text:p text:style-name="P3">A- Read all the quiz once, or twice, before beginning to write. Make sure to comprehend all questions and start with those you feel most confident in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3">---------------------------------------------------------------------------------------------------------------------------</text:p>
      <text:p text:style-name="P4">Problem <text:span text:style-name="T3">1</text:span></text:p>
      <text:p text:style-name="P5">(a) What are the amplitude, wavelength, frequency, and phase constant of the traveling wave below.</text:p>
      <text:p text:style-name="P5"/>
      <text:p text:style-name="P5"/>
      <text:p text:style-name="P6"><draw:frame draw:style-name="fr1" draw:name="Image1" text:anchor-type="char" svg:width="6.9252in" svg:height="2.5953in" draw:z-index="0"><draw:image xlink:href="Pictures/100000010000029B000000FA21687879.png" xlink:type="simple" xlink:show="embed" xlink:actuate="onLoad" draw:mime-type="image/png"/></draw:frame><text:s/></text:p>
      <text:p text:style-name="P4">Problem <text:span text:style-name="T4">2</text:span></text:p>
      <text:p text:style-name="P7">A wire has a tension equal to its weight. What is the velocity of waves?</text:p>
      <text:p text:style-name="P7"/>
      <text:p text:style-name="P4">Problem <text:span text:style-name="T4">3</text:span></text:p>
      <text:p text:style-name="P7">A vertical tube of radius 1cm, open at the top to the atmosphere,</text:p>
      <text:p text:style-name="P7">contains 2cm of oil (ρ<text:span text:style-name="T4">_</text:span>oil = 0.82 ρ<text:span text:style-name="T4">_</text:span>water ) floating on 3cm of water. What is the gauge</text:p>
      <text:p text:style-name="P7">pressure (i.e., pressure in excess of the atmospheric) at the bottom?</text:p>
      <text:p text:style-name="P7"/>
      <text:p text:style-name="P4">Problem <text:span text:style-name="T4">4</text:span></text:p>
      <text:p text:style-name="P7">A wall of an outdoor pool is 10m long and 2m deep. What force</text:p>
      <text:p text:style-name="P7">is needed to keep it in place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0T19:10:25.827912193</meta:creation-date>
    <dc:date>2026-03-30T19:18:39.139693073</dc:date>
    <meta:editing-duration>PT8M13S</meta:editing-duration>
    <meta:editing-cycles>1</meta:editing-cycles>
    <meta:document-statistic meta:table-count="0" meta:image-count="1" meta:object-count="0" meta:page-count="1" meta:paragraph-count="17" meta:word-count="168" meta:character-count="1014" meta:non-whitespace-character-count="859"/>
    <meta:generator>LibreOffice/26.2.2.2$Linux_X86_64 LibreOffice_project/620$Build-2</meta:generator>
  </office:meta>
</office:document-meta>
</file>