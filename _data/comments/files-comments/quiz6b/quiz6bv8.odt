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Pictures/100000010000017900000191F0B213D0.png" manifest:media-type="image/png"/>
  <manifest:file-entry manifest:full-path="Pictures/1000000100000132000000EB073B375D.png" manifest:media-type="image/png"/>
  <manifest:file-entry manifest:full-path="styles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weight="bold" officeooo:rsid="000ca8b4" officeooo:paragraph-rsid="000cc93f" style:font-weight-asian="bold" style:font-weight-complex="bold"/>
    </style:style>
    <style:style style:name="P2" style:family="paragraph" style:parent-style-name="Standard">
      <style:text-properties officeooo:rsid="000ca8b4" officeooo:paragraph-rsid="000cc93f"/>
    </style:style>
    <style:style style:name="P3" style:family="paragraph" style:parent-style-name="Standard">
      <style:text-properties officeooo:rsid="000ac56d" officeooo:paragraph-rsid="000cc93f"/>
    </style:style>
    <style:style style:name="P4" style:family="paragraph" style:parent-style-name="Standard">
      <style:text-properties fo:font-weight="bold" officeooo:rsid="000ca8b4" officeooo:paragraph-rsid="000cc93f" style:font-weight-asian="bold" style:font-weight-complex="bold"/>
    </style:style>
    <style:style style:name="P5" style:family="paragraph" style:parent-style-name="Standard">
      <style:text-properties fo:font-weight="bold" officeooo:rsid="000ac56d" officeooo:paragraph-rsid="000cc93f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1.1862in"/>
        </style:tab-stops>
      </style:paragraph-properties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26e4f1" officeooo:paragraph-rsid="000cc93f" style:font-weight-asian="bold" style:font-weight-complex="bold"/>
    </style:style>
    <style:style style:name="P7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26e4f1" officeooo:paragraph-rsid="000cc93f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1.1862in"/>
        </style:tab-stops>
      </style:paragraph-properties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26e4f1" officeooo:paragraph-rsid="000d419b" style:font-weight-asian="bold" style:font-weight-complex="bold"/>
    </style:style>
    <style:style style:name="P9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26e4f1" officeooo:paragraph-rsid="000d419b" style:font-weight-asian="bold" style:font-weight-complex="bold"/>
    </style:style>
    <style:style style:name="P10" style:family="paragraph" style:parent-style-name="Standard">
      <style:paragraph-properties>
        <style:tab-stops>
          <style:tab-stop style:position="1.1862in"/>
        </style:tab-stops>
      </style:paragraph-properties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26e4f1" officeooo:paragraph-rsid="000d7df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2329e" style:font-weight-asian="bold" style:font-weight-complex="bold"/>
    </style:style>
    <style:style style:name="T4" style:family="text">
      <style:text-properties fo:font-weight="bold" officeooo:rsid="000cc93f" style:font-weight-asian="bold" style:font-weight-complex="bold"/>
    </style:style>
    <style:style style:name="T5" style:family="text">
      <style:text-properties fo:font-weight="bold" officeooo:rsid="000e3f4e" style:font-weight-asian="bold" style:font-weight-complex="bold"/>
    </style:style>
    <style:style style:name="T6" style:family="text">
      <style:text-properties officeooo:rsid="001527a6"/>
    </style:style>
    <style:style style:name="T7" style:family="text">
      <style:text-properties officeooo:rsid="000cc93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cc93f" style:font-weight-asian="normal" style:font-weight-complex="normal"/>
    </style:style>
    <style:style style:name="T10" style:family="text">
      <style:text-properties fo:font-weight="normal" officeooo:rsid="000d419b" style:font-weight-asian="normal" style:font-weight-complex="normal"/>
    </style:style>
    <style:style style:name="T11" style:family="text">
      <style:text-properties officeooo:rsid="000d419b"/>
    </style:style>
    <style:style style:name="T12" style:family="text">
      <style:text-properties officeooo:rsid="000d7d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________________________</text:p>
      <text:p text:style-name="P2"><text:span text:style-name="T1"><text:tab/><text:tab/><text:tab/><text:tab/><text:tab/> <text:s text:c="3"/></text:span><text:span text:style-name="T2">PHY20</text:span><text:span text:style-name="T3">4</text:span><text:span text:style-name="T2">8C, </text:span><text:span text:style-name="T4">Practice </text:span><text:span text:style-name="T1">Quiz </text:span><text:span text:style-name="T5">6</text:span></text:p>
      <text:p text:style-name="P3"><text:span text:style-name="T1"/></text:p>
      <text:p text:style-name="P4">A- Read all the quiz once, or twice, before beginning to write. Make sure to comprehend all questions and start with those you fe<text:span text:style-name="T6">el</text:span> most confident <text:span text:style-name="T6">in</text:span>.</text:p>
      <text:p text:style-name="P4">B – Be clear and concise. There are no extra points for being verbose or writing extra.</text:p>
      <text:p text:style-name="P4">C –Only use the white pages that I will provide. You have 50 minutes to answer the quiz.</text:p>
      <text:p text:style-name="P5">---------------------------------------------------------------------------------------------------------------------------</text:p>
      <text:p text:style-name="P6">Problem <text:span text:style-name="T7">1</text:span> <text:span text:style-name="T8">(Sears and Zemansky)</text:span></text:p>
      <text:p text:style-name="P7"/>
      <text:p text:style-name="P7"><text:span text:style-name="T9">In the circuit shown in </text:span><text:span text:style-name="T10">the figure, </text:span><text:span text:style-name="T9">when switch S is suddenly closed, the wire L is pulled toward the lower wire carrying current I. Which (a or b) is the positive terminal of the battery? How do you know?</text:span></text:p>
      <text:p text:style-name="P7"><draw:frame draw:style-name="fr1" draw:name="Image1" text:anchor-type="char" svg:x="0.122in" svg:y="0.0756in" svg:width="3.1874in" svg:height="2.448in" draw:z-index="0"><draw:image xlink:href="Pictures/1000000100000132000000EB073B375D.png" xlink:type="simple" xlink:show="embed" xlink:actuate="onLoad" draw:mime-type="image/png"/></draw:frame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8">Problem <text:span text:style-name="T11">2</text:span> <text:span text:style-name="T8">(Sears and Zemansky)</text:span></text:p>
      <text:p text:style-name="P9"/>
      <text:p text:style-name="P9"><text:span text:style-name="T9">A wide, long, insulating belt has a uniform positive charge per unit area </text:span><text:span text:style-name="T9"><draw:frame draw:style-name="fr2" draw:name="Object1" text:anchor-type="as-char" svg:y="-0.1492in" svg:width="0.1in" svg:height="0.1854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9"><text:s/>on its upper surface. Rollers at each end move the belt to the right at a constant speed v. Calculate the magnitude and direction of the magnetic field produced by the moving belt at a point just above its surface. (Hint: At points near the surface and far from its edges or ends, the moving belt can be considered to be an infinite current sheet</text:span><text:span text:style-name="T10">)</text:span></text:p>
      <text:p text:style-name="P10"/>
      <text:p text:style-name="P10"><text:span text:style-name="T11">Problem </text:span><text:span text:style-name="T12">3</text:span><text:span text:style-name="T10"> (Sears and Zemansky)</text:span></text:p>
      <text:p text:style-name="P9"><text:span text:style-name="T10">The Figure shows, in cross section, several conductors that carry currents through theplane of thefigure. The currentshave the magnitudes I1 = 4.0 A,I2 = 6.0 A, and I3 = 2.0 A, andthe directions shown. Four paths,labeled a through d, are shown.What is the line integral </text:span><text:span text:style-name="T10"><draw:frame draw:style-name="fr2" draw:name="Object2" text:anchor-type="as-char" svg:y="-0.1827in" svg:width="0.522in" svg:height="0.2528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0"><text:s/>for each path?</text:span></text:p>
      <text:p text:style-name="P9"><text:span text:style-name="T10"/></text:p>
      <text:p text:style-name="P9"><draw:frame draw:style-name="fr3" draw:name="Image2" text:anchor-type="char" svg:width="2.0591in" svg:height="2.1902in" draw:z-index="3"><draw:image xlink:href="Pictures/100000010000017900000191F0B213D0.png" xlink:type="simple" xlink:show="embed" xlink:actuate="onLoad" draw:mime-type="image/png"/></draw:frame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3T21:44:00.827548906</meta:creation-date>
    <dc:date>2026-03-30T17:50:37.249536679</dc:date>
    <meta:editing-duration>PT11M9S</meta:editing-duration>
    <meta:editing-cycles>3</meta:editing-cycles>
    <meta:generator>LibreOffice/25.8.5.2$Linux_X86_64 LibreOffice_project/580$Build-2</meta:generator>
    <meta:document-statistic meta:table-count="0" meta:image-count="2" meta:object-count="2" meta:page-count="1" meta:paragraph-count="12" meta:word-count="249" meta:character-count="1513" meta:non-whitespace-character-count="1264"/>
  </office:meta>
</office:document-meta>
</file>

<file path=Object 1/content.xml><?xml version="1.0" encoding="utf-8"?>
<math xmlns="http://www.w3.org/1998/Math/MathML" display="block">
  <semantics>
    <mi>σ</mi>
    <annotation encoding="StarMath 5.0">%sigma</annotation>
  </semantics>
</math>
</file>

<file path=Object 2/content.xml><?xml version="1.0" encoding="utf-8"?>
<math xmlns="http://www.w3.org/1998/Math/MathML" display="block">
  <semantics>
    <mrow>
      <mrow>
        <mrow>
          <mo stretchy="false">∮</mo>
          <mstyle mathvariant="bold">
            <mi>B</mi>
          </mstyle>
        </mrow>
        <mo stretchy="false">⋅</mo>
        <mi>d</mi>
      </mrow>
      <mstyle mathvariant="bold">
        <mi>l</mi>
      </mstyle>
    </mrow>
    <annotation encoding="StarMath 5.0">lint bold{B} cdot  d bold{l}</annotation>
  </semantics>
</math>
</file>