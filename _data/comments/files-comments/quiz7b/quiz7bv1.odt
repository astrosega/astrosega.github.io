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.0486in, 0in, 0in, 0.3264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201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1in" svg:stroke-color="#3465a4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Name ________________________ <text:s text:c="5"/>PHY2049C, Quiz 7</text:span></text:p>
      <text:p text:style-name="Standard"/>
      <text:p text:style-name="P3">A- Read all the quiz once, or twice, before beginning to write. Make sure to comprehend all questions and start with those you feel most confident in.</text:p>
      <text:p text:style-name="P4">B – Be clear and concise. There are no extra points for being verbose or writing extra.</text:p>
      <text:p text:style-name="P5">C –Only use the white pages that I will provide. You have 60 minutes to answer the quiz.</text:p>
      <text:p text:style-name="P6">---------------------------------------------------------------------------------------------------------------------------</text:p>
      <text:p text:style-name="Standard"><text:span text:style-name="T7">Problem 1<text:s/></text:span>The current I in a long, straight wire is constant and is directed toward the right as in the figure. Conducting loops A, B, C, and D are moving, in the directions shown, near the wire. What is the net force on loop A due to the main wire and loop C’s current.<text:s/>If C has a current, assume only the closest side of loop C affects A and take it to be an infinite wire. The side of the small squares is 1cm.</text:p>
      <text:p text:style-name="Standard"/>
      <text:p text:style-name="Standard"><draw:frame draw:z-index="251658240" draw:style-name="a0" draw:name="Image1" text:anchor-type="paragraph" svg:x="0.25938in" svg:y="0.14688in" svg:width="4.46346in" svg:height="2.56783in" style:rel-width="scale" style:rel-height="scale"><draw:image xlink:href="media/image1.png" xlink:type="simple" xlink:show="embed" xlink:actuate="onLoad"/><svg:title/><svg:desc/></draw:frame><text:tab/></text:p>
      <text:p text:style-name="Standard"/>
      <text:p text:style-name="Standard"/>
      <text:p text:style-name="Standard"><draw:frame draw:z-index="4" draw:id="id0" draw:style-name="a1" draw:name="Text Frame 2" text:anchor-type="paragraph" svg:x="-3.1272in" svg:y="0.1398in" svg:width="0.69375in" svg:height="0.69375in" style:rel-width="scale" style:rel-height="scale"><draw:text-box><text:p text:style-name="Normal">2cm</text:p></draw:text-box><svg:title/><svg:desc/></draw:frame></text:p>
      <text:p text:style-name="Standard"><draw:connector draw:type="line" svg:x1="-3.2429in" svg:y1="0.14936in" svg:x2="-2.65262in" svg:y2="0.1445in" draw:z-index="5" draw:id="id1" draw:style-name="a2" draw:name="Vertical line 2" text:anchor-type="paragraph"><svg:title/><svg:desc/></draw:connector></text:p>
      <text:p text:style-name="Standard"><draw:connector draw:type="line" svg:x1="-3.43945in" svg:y1="0.15in" svg:x2="-3.4457in" svg:y2="0.44514in" draw:z-index="2" draw:id="id2" draw:style-name="a3" draw:name="Vertical line 1" text:anchor-type="paragraph"><svg:title/><svg:desc/></draw:connector></text:p>
      <text:p text:style-name="Standard"><draw:frame draw:z-index="3" draw:id="id3" draw:style-name="a4" draw:name="Text Frame 1" text:anchor-type="paragraph" svg:x="-3.4398in" svg:y="0.052in" svg:width="0.69375in" svg:height="0.69375in" style:rel-width="scale" style:rel-height="scale"><draw:text-box><text:p text:style-name="Normal">1cm</text:p></draw:text-box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style-name="a5" draw:name="Image2" text:anchor-type="paragraph" svg:x="4.0875in" svg:y="0.42292in" svg:width="2.24236in" svg:height="2.63056in" style:rel-width="scale" style:rel-height="scale"><draw:image xlink:href="media/image2.png" xlink:type="simple" xlink:show="embed" xlink:actuate="onLoad"/><svg:title/><svg:desc/></draw:frame><text:span text:style-name="T8">Problem 2<text:s/></text:span>A bar magnet is dropped through a loop of wire as shown in the figure. Sketch a plot (Exact y-axis values do not matter but shape of the plot does) of the induced current over time. Counterclockwise is positive</text:p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Problem 3</text:p>
      <text:p text:style-name="Standard">There were 35 apples,<text:s/>10 oranges<text:s/>and 77 grapes<text:s/>in a basket, and 4 empty baskets. How do you distribute the oranges,<text:s/>apples<text:s/>and grapes (they must be whole)<text:s/>so that the baskets are as similar as possible? (The<text:s/>amount of apple, oranges and grapes each basket contains is as similar as possible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5-12-07T23:06:00Z</meta:creation-date>
    <dc:date>2026-07-06T15:47:00Z</dc:date>
    <meta:print-date>2026-07-06T14:28:00Z</meta:print-date>
    <meta:template xlink:href="Normal.dotm" xlink:type="simple"/>
    <meta:editing-cycles>2</meta:editing-cycles>
    <meta:editing-duration>PT4980S</meta:editing-duration>
    <meta:document-statistic meta:page-count="1" meta:paragraph-count="2" meta:word-count="221" meta:character-count="1481" meta:row-count="10" meta:non-whitespace-character-count="1262"/>
  </office:meta>
</office:document-meta>
</file>