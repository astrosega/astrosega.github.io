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F000000AA586D6D8B.png" manifest:media-type="image/png"/>
  <manifest:file-entry manifest:full-path="Pictures/10000001000001AD000000ABB8D19ECB.png" manifest:media-type="image/png"/>
  <manifest:file-entry manifest:full-path="Pictures/100000010000021A000000BC47BB8A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1124c5"/>
    </style:style>
    <style:style style:name="P2" style:family="paragraph" style:parent-style-name="Standard">
      <style:text-properties officeooo:paragraph-rsid="001124c5"/>
    </style:style>
    <style:style style:name="P3" style:family="paragraph" style:parent-style-name="Standard">
      <style:text-properties fo:font-weight="bold" officeooo:paragraph-rsid="001124c5" style:font-weight-asian="bold" style:font-weight-complex="bold"/>
    </style:style>
    <style:style style:name="P4" style:family="paragraph" style:parent-style-name="Standard">
      <style:text-properties fo:font-weight="bold" officeooo:rsid="001124c5" officeooo:paragraph-rsid="001124c5" style:font-weight-asian="bold" style:font-weight-complex="bold"/>
    </style:style>
    <style:style style:name="P5" style:family="paragraph" style:parent-style-name="Standard">
      <style:text-properties fo:font-weight="bold" officeooo:rsid="00125085" officeooo:paragraph-rsid="001250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4c5" style:font-weight-asian="bold" style:font-weight-complex="bold"/>
    </style:style>
    <style:style style:name="T3" style:family="text">
      <style:text-properties officeooo:rsid="00142f74"/>
    </style:style>
    <style:style style:name="T4" style:family="text">
      <style:text-properties officeooo:rsid="001124c5"/>
    </style:style>
    <style:style style:name="T5" style:family="text">
      <style:text-properties officeooo:rsid="001250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/text:span><text:span text:style-name="Default_20_Paragraph_20_Font"><text:span text:style-name="T1"><text:s/>PHY2049C, Quiz </text:span></text:span><text:span text:style-name="Default_20_Paragraph_20_Font"><text:span text:style-name="T2">7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<text:span text:style-name="T3">6</text:span>0 minutes to answer the quiz.</text:p>
      <text:p text:style-name="P2"><text:span text:style-name="T1">--------------------------------------------------------------------------------------------------------------------</text:span></text:p>
      <text:p text:style-name="P4">Problem 1</text:p>
      <text:p text:style-name="Standard"><text:span text:style-name="T4">The figure</text:span> shows three loop models of an electron orbiting counterclockwise within a magnetic field. The fields are nonuniform for models 1 and 2 and uniform for model 3, <text:span text:style-name="T4">Rank</text:span> (a) the magnetic dipole moment of the loop and (b) the magnetic force on the loop <text:span text:style-name="T4">(</text:span>up <text:span text:style-name="T4">direction is positive), greatest first</text:span></text:p>
      <text:p text:style-name="Standard"/>
      <text:p text:style-name="Standard"><draw:frame draw:style-name="fr1" draw:name="Image1" text:anchor-type="char" svg:width="5.6043in" svg:height="1.9583in" draw:z-index="0"><draw:image xlink:href="Pictures/100000010000021A000000BC47BB8A8B.png" xlink:type="simple" xlink:show="embed" xlink:actuate="onLoad" draw:mime-type="image/png"/></draw:frame></text:p>
      <text:p text:style-name="P4">Problem 2</text:p>
      <text:p text:style-name="P2">The figure shows three situations in which identical circular conducting loops are in</text:p>
      <text:p text:style-name="P2">uniform magnetic fields that are either increasing (Inc) or decreasing (Dec) in mag-</text:p>
      <text:p text:style-name="P2">nitude at identical rates. In each, the dashed line coincides with a diameter. Rank the</text:p>
      <text:p text:style-name="P2">situations according to the magnitude of the current induced in the loops, greatest first.</text:p>
      <text:p text:style-name="P2"><draw:frame draw:style-name="fr1" draw:name="Image2" text:anchor-type="char" svg:width="3.6346in" svg:height="1.4484in" draw:z-index="1"><draw:image xlink:href="Pictures/10000001000001AD000000ABB8D19ECB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oblem 3</text:p>
      <text:p text:style-name="P2">In <text:span text:style-name="T5">the figure</text:span>, two straight conducting rails form a right angle. A conducting bar</text:p>
      <text:p text:style-name="P2">in contact with the rails starts at the vertex at time t = 0 and moves with a constant velocity of 5.20 m/s along them. A magneti<text:span text:style-name="T5">c </text:span>field with B = 0.350 T is directed out of the page. <text:span text:style-name="T5">Compute the induced emf.</text:span></text:p>
      <text:p text:style-name="P2"><draw:frame draw:style-name="fr2" draw:name="Image3" text:anchor-type="char" svg:width="2.9898in" svg:height="1.7709in" draw:z-index="2"><draw:image xlink:href="Pictures/100000010000011F000000AA586D6D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8:03:12.769098648</meta:creation-date>
    <dc:date>2026-03-24T18:20:01.462569236</dc:date>
    <meta:editing-duration>PT6M36S</meta:editing-duration>
    <meta:editing-cycles>2</meta:editing-cycles>
    <meta:generator>LibreOffice/25.8.5.2$Linux_X86_64 LibreOffice_project/580$Build-2</meta:generator>
    <meta:document-statistic meta:table-count="0" meta:image-count="3" meta:object-count="0" meta:page-count="1" meta:paragraph-count="16" meta:word-count="237" meta:character-count="1450" meta:non-whitespace-character-count="1225"/>
  </office:meta>
</office:document-meta>
</file>